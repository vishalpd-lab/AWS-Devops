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9000000BEA15363C9.png" manifest:media-type="image/png"/>
  <manifest:file-entry manifest:full-path="Pictures/10000001000004C1000000BD68946C3E.png" manifest:media-type="image/png"/>
  <manifest:file-entry manifest:full-path="Pictures/100000010000063A000002950D27B38C.png" manifest:media-type="image/png"/>
  <manifest:file-entry manifest:full-path="Pictures/10000001000006DA0000021EDE992CE5.png" manifest:media-type="image/png"/>
  <manifest:file-entry manifest:full-path="Pictures/100000010000063A0000029574D7848B.png" manifest:media-type="image/png"/>
  <manifest:file-entry manifest:full-path="Pictures/10000001000006DA0000021EDA218FE2.png" manifest:media-type="image/png"/>
  <manifest:file-entry manifest:full-path="Pictures/1000000100000729000003680D47F757.png" manifest:media-type="image/png"/>
  <manifest:file-entry manifest:full-path="Pictures/1000000100000721000003719D2F0B7E.png" manifest:media-type="image/png"/>
  <manifest:file-entry manifest:full-path="Pictures/10000001000005D30000038E9A4ADF21.png" manifest:media-type="image/png"/>
  <manifest:file-entry manifest:full-path="Pictures/10000001000004600000037F728C87A1.png" manifest:media-type="image/png"/>
  <manifest:file-entry manifest:full-path="Pictures/1000000100000715000003055178CA05.png" manifest:media-type="image/png"/>
  <manifest:file-entry manifest:full-path="Pictures/1000000100000442000003767492E9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95c70" officeooo:paragraph-rsid="00195c70"/>
    </style:style>
    <style:style style:name="P3" style:family="paragraph" style:parent-style-name="Standard">
      <style:text-properties officeooo:rsid="001ac3a5" officeooo:paragraph-rsid="001ac3a5"/>
    </style:style>
    <style:style style:name="P4" style:family="paragraph" style:parent-style-name="Standard">
      <style:text-properties officeooo:rsid="001b5c71" officeooo:paragraph-rsid="001b5c71"/>
    </style:style>
    <style:style style:name="P5" style:family="paragraph" style:parent-style-name="Standard">
      <style:text-properties officeooo:rsid="001b5e11" officeooo:paragraph-rsid="001b5e11"/>
    </style:style>
    <style:style style:name="P6" style:family="paragraph" style:parent-style-name="Standard">
      <style:text-properties officeooo:rsid="001cc13b" officeooo:paragraph-rsid="001cc13b"/>
    </style:style>
    <style:style style:name="P7" style:family="paragraph" style:parent-style-name="Standard">
      <style:text-properties officeooo:rsid="001e0b9e" officeooo:paragraph-rsid="001e0b9e"/>
    </style:style>
    <style:style style:name="P8" style:family="paragraph" style:parent-style-name="Standard">
      <style:text-properties officeooo:rsid="001e644d" officeooo:paragraph-rsid="001e644d"/>
    </style:style>
    <style:style style:name="P9" style:family="paragraph" style:parent-style-name="Standard">
      <style:text-properties officeooo:rsid="001f2478" officeooo:paragraph-rsid="001f2478"/>
    </style:style>
    <style:style style:name="P10" style:family="paragraph" style:parent-style-name="Standard">
      <style:text-properties officeooo:rsid="0021f46a" officeooo:paragraph-rsid="0021f46a"/>
    </style:style>
    <style:style style:name="P11" style:family="paragraph" style:parent-style-name="Text_20_body">
      <style:text-properties officeooo:rsid="001f2478" officeooo:paragraph-rsid="001f2478"/>
    </style:style>
    <style:style style:name="T1" style:family="text">
      <style:text-properties officeooo:rsid="001ac3a5"/>
    </style:style>
    <style:style style:name="T2"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y 1: Task</text:p>
      <text:p text:style-name="P2">Create EC2 instance, create IAM user, Create S3 bucker, one user who sit other location and accecc from their laptop assign IAM role for that user and also he see s3 bucket/data object</text:p>
      <text:p text:style-name="P2"/>
      <text:p text:style-name="P2">Step 1. Create EC2 instance</text:p>
      <text:p text:style-name="P2">choose US west 2 availability zone </text:p>
      <text:p text:style-name="P2"/>
      <text:p text:style-name="P2">Launch instance &gt; select Ubuntu &gt; t<text:span text:style-name="T1">3</text:span> m<text:span text:style-name="T1">icro</text:span> &gt; key pair &gt; </text:p>
      <text:p text:style-name="P2"/>
      <text:p text:style-name="P2"><draw:frame draw:style-name="fr1" draw:name="Image1" text:anchor-type="char" svg:width="6.6929in" svg:height="5.4402in" draw:z-index="0"><draw:image xlink:href="Pictures/1000000100000442000003767492E91C.png" xlink:type="simple" xlink:show="embed" xlink:actuate="onLoad" draw:mime-type="image/png"/></draw:frame><text:s/></text:p>
      <text:p text:style-name="P3">Create New security group &gt; Allow SSH traffic &gt; select memory as per requirement &gt; Launch EC2</text:p>
      <text:p text:style-name="P3"/>
      <text:p text:style-name="P3"><draw:frame draw:style-name="fr3" draw:name="Image2" text:anchor-type="char" svg:width="6.6929in" svg:height="5.348in" draw:z-index="1"><draw:image xlink:href="Pictures/10000001000004600000037F728C87A1.png" xlink:type="simple" xlink:show="embed" xlink:actuate="onLoad" draw:mime-type="image/png"/></draw:frame><text:soft-page-break/><text:s/></text:p>
      <text:p text:style-name="P4">Instance is Ready:</text:p>
      <text:p text:style-name="P4"/>
      <text:p text:style-name="P4"><draw:frame draw:style-name="fr1" draw:name="Image3" text:anchor-type="char" svg:width="6.6929in" svg:height="3.2307in" draw:z-index="2"><draw:image xlink:href="Pictures/1000000100000721000003719D2F0B7E.png" xlink:type="simple" xlink:show="embed" xlink:actuate="onLoad" draw:mime-type="image/png"/></draw:frame><text:s/></text:p>
      <text:p text:style-name="P4"/>
      <text:p text:style-name="P4"/>
      <text:p text:style-name="P4"/>
      <text:p text:style-name="P4"/>
      <text:p text:style-name="P5"><text:soft-page-break/>Step 2: Create IAM user with policies</text:p>
      <text:p text:style-name="P5"><text:s text:c="3"/>We have created test1 user and assign ec2 and s3 access for this user </text:p>
      <text:p text:style-name="P5"/>
      <text:p text:style-name="P5"><draw:frame draw:style-name="fr1" draw:name="Image4" text:anchor-type="char" svg:width="6.6929in" svg:height="2.8535in" draw:z-index="3"><draw:image xlink:href="Pictures/1000000100000715000003055178CA05.png" xlink:type="simple" xlink:show="embed" xlink:actuate="onLoad" draw:mime-type="image/png"/></draw:frame><text:s text:c="2"/></text:p>
      <text:p text:style-name="P5">Click and Create user </text:p>
      <text:p text:style-name="P5"/>
      <text:p text:style-name="P5"><draw:frame draw:style-name="fr1" draw:name="Image5" text:anchor-type="char" svg:width="6.6929in" svg:height="3.1839in" draw:z-index="4"><draw:image xlink:href="Pictures/1000000100000729000003680D47F757.png" xlink:type="simple" xlink:show="embed" xlink:actuate="onLoad" draw:mime-type="image/png"/></draw:frame><text:s/></text:p>
      <text:p text:style-name="P6"><text:s text:c="2"/>Step 2: create S3 bucket &gt; </text:p>
      <text:p text:style-name="P6"/>
      <text:p text:style-name="P6"><draw:frame draw:style-name="fr1" draw:name="Image6" text:anchor-type="char" svg:width="6.6929in" svg:height="2.0681in" draw:z-index="5"><draw:image xlink:href="Pictures/10000001000006DA0000021EDA218FE2.png" xlink:type="simple" xlink:show="embed" xlink:actuate="onLoad" draw:mime-type="image/png"/></draw:frame><text:s/></text:p>
      <text:p text:style-name="P7"><text:soft-page-break/>Step 4: Uplode something data into our created S3 bucket </text:p>
      <text:p text:style-name="P7"/>
      <text:p text:style-name="P7"><draw:frame draw:style-name="fr1" draw:name="Image7" text:anchor-type="char" svg:width="6.6929in" svg:height="2.0681in" draw:z-index="6"><draw:image xlink:href="Pictures/10000001000006DA0000021EDE992CE5.png" xlink:type="simple" xlink:show="embed" xlink:actuate="onLoad" draw:mime-type="image/png"/></draw:frame><text:s/></text:p>
      <text:p text:style-name="P7">Step 5: Now we have from outside from aws, access this created S3 bucket.</text:p>
      <text:p text:style-name="P7">For that we configure AWS cli </text:p>
      <text:p text:style-name="P7"/>
      <text:p text:style-name="P8">Create Access Key :</text:p>
      <text:p text:style-name="P8">IAM &gt; user &gt; Security credentials &gt; Access Key &gt; create Access key &gt; choose Command line CLI</text:p>
      <text:p text:style-name="P8"/>
      <text:p text:style-name="P8"><draw:frame draw:style-name="fr1" draw:name="Image8" text:anchor-type="char" svg:width="6.6929in" svg:height="4.0846in" draw:z-index="7"><draw:image xlink:href="Pictures/10000001000005D30000038E9A4ADF21.png" xlink:type="simple" xlink:show="embed" xlink:actuate="onLoad" draw:mime-type="image/png"/></draw:frame><text:s/><draw:frame draw:style-name="fr2" draw:name="Image9" text:anchor-type="char" svg:x="0.3661in" svg:y="4.6807in" svg:width="5.3575in" svg:height="2.2217in" draw:z-index="8"><draw:image xlink:href="Pictures/100000010000063A0000029574D7848B.png" xlink:type="simple" xlink:show="embed" xlink:actuate="onLoad" draw:mime-type="image/png"/></draw:frame></text:p>
      <text:p text:style-name="P8"><text:s/></text:p>
      <text:p text:style-name="P8"><text:s text:c="145"/></text:p>
      <text:p text:style-name="P8"><text:s/></text:p>
      <text:p text:style-name="P8"/>
      <text:p text:style-name="P8"/>
      <text:p text:style-name="P8"/>
      <text:p text:style-name="P8"/>
      <text:p text:style-name="P8"/>
      <text:p text:style-name="P8"/>
      <text:p text:style-name="P8"/>
      <text:p text:style-name="P8"><text:soft-page-break/></text:p>
      <text:p text:style-name="P9">Step 6 : Now connect EC2 instance for access aws cli &gt;</text:p>
      <text:p text:style-name="P9"/>
      <text:p text:style-name="P9"><draw:frame draw:style-name="fr1" draw:name="Image10" text:anchor-type="char" svg:width="6.6929in" svg:height="2.7752in" draw:z-index="9"><draw:image xlink:href="Pictures/100000010000063A000002950D27B38C.png" xlink:type="simple" xlink:show="embed" xlink:actuate="onLoad" draw:mime-type="image/png"/></draw:frame><text:s/></text:p>
      <text:p text:style-name="P9">Step 7 : Install aws cli v2 on this instance &gt;</text:p>
      <text:p text:style-name="P9"><text:s text:c="2"/># sudo apti install unzip </text:p>
      <text:p text:style-name="P11"><text:span text:style-name="T2"/></text:p>
      <text:p text:style-name="P11"><text:span text:style-name="T2">To install</text:span> the AWS CLI, run the following commands.</text:p>
      <text:p text:style-name="Preformatted_20_Text"><text:span text:style-name="Source_20_Text">$ curl "https://awscli.amazonaws.com/awscli-exe-linux-x86_64.zip" -o "awscliv2.zip"</text:span></text:p>
      <text:p text:style-name="Preformatted_20_Text"><text:span text:style-name="Source_20_Text">unzip awscliv2.zip</text:span></text:p>
      <text:p text:style-name="P1"><text:span text:style-name="Source_20_Text">sudo ./aws/install</text:span></text:p>
      <text:p text:style-name="P9"><draw:frame draw:style-name="fr1" draw:name="Image11" text:anchor-type="char" svg:width="6.6929in" svg:height="1.039in" draw:z-index="10"><draw:image xlink:href="Pictures/10000001000004C1000000BD68946C3E.png" xlink:type="simple" xlink:show="embed" xlink:actuate="onLoad" draw:mime-type="image/png"/></draw:frame><text:s/></text:p>
      <text:p text:style-name="P10">Now configure aws credentials :</text:p>
      <text:p text:style-name="P10"/>
      <text:p text:style-name="P10">#aws configure <text:s text:c="9"/>---- give aws access and secreat key from IAM user</text:p>
      <text:p text:style-name="P10"/>
      <text:p text:style-name="P10"><draw:frame draw:style-name="fr1" draw:name="Image12" text:anchor-type="char" svg:width="6.6929in" svg:height="1.7071in" draw:z-index="11"><draw:image xlink:href="Pictures/10000001000002E9000000BEA15363C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7T09:20:18.047214202</meta:creation-date>
    <dc:date>2026-07-17T10:20:16.904714858</dc:date>
    <meta:editing-duration>PT27M18S</meta:editing-duration>
    <meta:editing-cycles>8</meta:editing-cycles>
    <meta:generator>LibreOffice/24.2.7.2$Linux_X86_64 LibreOffice_project/420$Build-2</meta:generator>
    <meta:document-statistic meta:table-count="0" meta:image-count="12" meta:object-count="0" meta:page-count="5" meta:paragraph-count="38" meta:word-count="225" meta:character-count="1417" meta:non-whitespace-character-count="1035"/>
  </office:meta>
</office:document-meta>
</file>